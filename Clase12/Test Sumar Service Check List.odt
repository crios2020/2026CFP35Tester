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53ea" officeooo:paragraph-rsid="001753ea"/>
    </style:style>
    <style:style style:name="P2" style:family="paragraph" style:parent-style-name="Standard">
      <style:text-properties fo:color="#5eb91e" loext:opacity="100%" fo:font-weight="bold" officeooo:rsid="001fbde2" officeooo:paragraph-rsid="001fbde2" style:font-weight-asian="bold" style:font-weight-complex="bold"/>
    </style:style>
    <style:style style:name="P3" style:family="paragraph" style:parent-style-name="Standard">
      <style:text-properties fo:color="#81d41a" loext:opacity="100%" fo:font-weight="bold" officeooo:rsid="001b501b" officeooo:paragraph-rsid="001b501b" style:font-weight-asian="bold" style:font-weight-complex="bold"/>
    </style:style>
    <style:style style:name="P4" style:family="paragraph" style:parent-style-name="Heading_20_1">
      <style:text-properties officeooo:paragraph-rsid="0029b7cc"/>
    </style:style>
    <style:style style:name="P5" style:family="paragraph" style:parent-style-name="Text_20_body">
      <style:text-properties officeooo:rsid="001753ea" officeooo:paragraph-rsid="0029b7cc"/>
    </style:style>
    <style:style style:name="P6" style:family="paragraph" style:parent-style-name="Preformatted_20_Text">
      <style:text-properties officeooo:paragraph-rsid="002b0859"/>
    </style:style>
    <style:style style:name="P7" style:family="paragraph" style:parent-style-name="Standard">
      <style:text-properties officeooo:rsid="001753ea" officeooo:paragraph-rsid="002b0859"/>
    </style:style>
    <style:style style:name="P8" style:family="paragraph" style:parent-style-name="Standard">
      <style:text-properties fo:color="#5eb91e" loext:opacity="100%" fo:font-weight="bold" officeooo:rsid="00241bf5" officeooo:paragraph-rsid="00241bf5" style:font-weight-asian="bold" style:font-weight-complex="bold"/>
    </style:style>
    <style:style style:name="P9" style:family="paragraph" style:parent-style-name="Standard">
      <style:text-properties fo:color="#81d41a" loext:opacity="100%" fo:font-weight="normal" officeooo:rsid="00241bf5" officeooo:paragraph-rsid="00241bf5" style:font-weight-asian="normal" style:font-weight-complex="normal"/>
    </style:style>
    <style:style style:name="P10" style:family="paragraph" style:parent-style-name="Heading_20_2">
      <style:text-properties officeooo:paragraph-rsid="001753ea"/>
    </style:style>
    <style:style style:name="P11" style:family="paragraph" style:parent-style-name="Standard">
      <style:text-properties officeooo:rsid="0019397d" officeooo:paragraph-rsid="0019397d"/>
    </style:style>
    <style:style style:name="P12" style:family="paragraph" style:parent-style-name="Standard">
      <style:text-properties fo:color="#81d41a" loext:opacity="100%" fo:font-weight="bold" officeooo:rsid="001fd9f0" officeooo:paragraph-rsid="001fd9f0" style:font-weight-asian="bold" style:font-weight-complex="bold"/>
    </style:style>
    <style:style style:name="P13" style:family="paragraph" style:parent-style-name="Heading_20_2">
      <style:text-properties officeooo:paragraph-rsid="0019397d"/>
    </style:style>
    <style:style style:name="P14" style:family="paragraph" style:parent-style-name="Standard">
      <style:text-properties officeooo:rsid="001753ea" officeooo:paragraph-rsid="0019397d"/>
    </style:style>
    <style:style style:name="P15" style:family="paragraph" style:parent-style-name="Preformatted_20_Text">
      <style:text-properties fo:color="#000000" loext:opacity="100%" officeooo:paragraph-rsid="002b0859"/>
    </style:style>
    <style:style style:name="P16" style:family="paragraph" style:parent-style-name="Standard">
      <style:text-properties fo:color="#00a933" loext:opacity="100%" fo:font-weight="normal" officeooo:rsid="00277317" officeooo:paragraph-rsid="00277317" style:font-weight-asian="normal" style:font-weight-complex="normal"/>
    </style:style>
    <style:style style:name="P17" style:family="paragraph" style:parent-style-name="Preformatted_20_Text">
      <style:text-properties style:use-window-font-color="true" loext:opacity="0%" officeooo:paragraph-rsid="002b0859"/>
    </style:style>
    <style:style style:name="P18" style:family="paragraph" style:parent-style-name="Preformatted_20_Text">
      <style:text-properties officeooo:rsid="001753ea" officeooo:paragraph-rsid="0019397d"/>
    </style:style>
    <style:style style:name="P19" style:family="paragraph" style:parent-style-name="Standard">
      <style:text-properties fo:color="#ff0000" loext:opacity="100%" fo:font-weight="bold" officeooo:rsid="002e7d03" officeooo:paragraph-rsid="002e7d03" style:font-weight-asian="bold" style:font-weight-complex="bold"/>
    </style:style>
    <style:style style:name="P20" style:family="paragraph" style:parent-style-name="Standard">
      <style:text-properties fo:color="#00a933" loext:opacity="100%" fo:font-weight="bold" officeooo:rsid="0027d790" officeooo:paragraph-rsid="0027d790" style:font-weight-asian="bold" style:font-weight-complex="bold"/>
    </style:style>
    <style:style style:name="P21" style:family="paragraph" style:parent-style-name="Preformatted_20_Text">
      <style:text-properties fo:color="#00a933" loext:opacity="100%" officeooo:paragraph-rsid="002b0859"/>
    </style:style>
    <style:style style:name="P22" style:family="paragraph" style:parent-style-name="Preformatted_20_Text">
      <style:text-properties style:use-window-font-color="true" loext:opacity="0%" officeooo:paragraph-rsid="0019397d"/>
    </style:style>
    <style:style style:name="P23" style:family="paragraph" style:parent-style-name="Preformatted_20_Text">
      <style:text-properties fo:color="#00a933" loext:opacity="100%" officeooo:paragraph-rsid="0019397d"/>
    </style:style>
    <style:style style:name="P24" style:family="paragraph" style:parent-style-name="Preformatted_20_Text">
      <style:text-properties style:use-window-font-color="true" loext:opacity="0%" officeooo:rsid="001753ea" officeooo:paragraph-rsid="002b288d"/>
    </style:style>
    <style:style style:name="P25" style:family="paragraph" style:parent-style-name="Standard">
      <style:text-properties fo:color="#00a933" loext:opacity="100%" fo:font-weight="bold" officeooo:rsid="002136f5" officeooo:paragraph-rsid="002136f5" style:font-weight-asian="bold" style:font-weight-complex="bold"/>
    </style:style>
    <style:style style:name="T1" style:family="text">
      <style:text-properties officeooo:rsid="002e7d03"/>
    </style:style>
    <style:style style:name="T2" style:family="text">
      <style:text-properties officeooo:rsid="0029b7cc"/>
    </style:style>
    <style:style style:name="T3" style:family="text">
      <style:text-properties officeooo:rsid="002fe51e"/>
    </style:style>
    <style:style style:name="T4" style:family="text">
      <style:text-properties officeooo:rsid="001753ea"/>
    </style:style>
    <style:style style:name="T5" style:family="text">
      <style:text-properties officeooo:rsid="002b0859"/>
    </style:style>
    <style:style style:name="T6" style:family="text">
      <style:text-properties officeooo:rsid="0019397d"/>
    </style:style>
    <style:style style:name="T7" style:family="text">
      <style:text-properties officeooo:rsid="00277317"/>
    </style:style>
    <style:style style:name="T8" style:family="text">
      <style:text-properties fo:color="#00a933" loext:opacity="100%" officeooo:rsid="0019397d"/>
    </style:style>
    <style:style style:name="T9" style:family="text">
      <style:text-properties fo:color="#00a933" loext:opacity="100%" officeooo:rsid="002b0859"/>
    </style:style>
    <style:style style:name="T10" style:family="text">
      <style:text-properties fo:color="#00a933" loext:opacity="100%"/>
    </style:style>
    <style:style style:name="T11" style:family="text">
      <style:text-properties fo:color="#ff0000" loext:opacity="100%" officeooo:rsid="0019397d"/>
    </style:style>
    <style:style style:name="T12" style:family="text">
      <style:text-properties fo:color="#ff0000" loext:opacity="100%" officeooo:rsid="002b0859"/>
    </style:style>
    <style:style style:name="T13" style:family="text">
      <style:text-properties officeooo:rsid="001c0e23"/>
    </style:style>
    <style:style style:name="T14" style:family="text">
      <style:text-properties fo:color="#00a933" loext:opacity="100%" officeooo:rsid="002b28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­</text:span>Suite de Test para Sumar <text:span text:style-name="T2">Service</text:span></text:p>
      <text:p text:style-name="P1"/>
      <text:p text:style-name="P1">versión: 0,<text:span text:style-name="T3">2</text:span></text:p>
      <text:p text:style-name="P1"/>
      <text:h text:style-name="Heading_20_1" text:outline-level="1">Fundamentos de la suite de prueba</text:h>
      <text:p text:style-name="P1">Evaluar el funcionamiento del programa Sumar <text:span text:style-name="T2">Service</text:span></text:p>
      <text:p text:style-name="P1"/>
      <text:h text:style-name="Heading_20_1" text:outline-level="1">Check List</text:h>
      <text:p text:style-name="P1">Ejecutar la siguientes pruebas en el programa Sumar, Ejecutar todas las pruebas en <text:span text:style-name="T2">un browser de internet</text:span></text:p>
      <text:h text:style-name="Heading_20_2" text:outline-level="2"><text:span text:style-name="T4">0</text:span>- Testear Funcionamiento de <text:span text:style-name="T2">apache web server</text:span></text:h>
      <text:p text:style-name="P1">Fundamentos: verificar <text:span text:style-name="T2">la página de inicio de apache web server</text:span></text:p>
      <text:p text:style-name="P1"/>
      <text:p text:style-name="Preformatted_20_Text"><text:tab/>http://localhost/</text:p>
      <text:p text:style-name="Preformatted_20_Text"/>
      <text:p text:style-name="P1"/>
      <text:p text:style-name="P1">Se <text:span text:style-name="T2">espera presentación de apache web server</text:span></text:p>
      <text:p text:style-name="P2">OK</text:p>
      <text:p text:style-name="P3"/>
      <text:h text:style-name="P4" text:outline-level="1">1- Testear Funcionamiento de <text:span text:style-name="T2">programa sumar service</text:span></text:h>
      <text:p text:style-name="P5">Fundamentos: verificar <text:span text:style-name="T2">la página de inicio de sumar web service</text:span></text:p>
      <text:p text:style-name="P6"><text:tab/>http://localhost/<text:span text:style-name="T5">sumarService</text:span></text:p>
      <text:p text:style-name="P7">Se <text:span text:style-name="T2">espera presentación de </text:span><text:span text:style-name="T5">sumarService.</text:span></text:p>
      <text:p text:style-name="P8">OK</text:p>
      <text:p text:style-name="P3"/>
      <text:h text:style-name="Heading_20_2" text:outline-level="2">2- Testear Programa sin parámetros</text:h>
      <text:p text:style-name="P1">Fundamentos: verificar el funcionamiento del programa sin argumentos de entrada.</text:p>
      <text:p text:style-name="P1"/>
      <text:p text:style-name="P6"><text:tab/>http://localhost/<text:span text:style-name="T5">sumarService</text:span></text:p>
      <text:p text:style-name="P1"/>
      <text:p text:style-name="P7">Se <text:span text:style-name="T2">espera presentación de </text:span><text:span text:style-name="T5">sumarService con ayuda de uso.</text:span></text:p>
      <text:p text:style-name="P9">OK</text:p>
      <text:h text:style-name="Heading_20_2" text:outline-level="2">3- Testear Programa con un parámetro de entrada</text:h>
      <text:p text:style-name="P1"/>
      <text:p text:style-name="P1">Fundamentos: Verificar ingreso de parámetros incorrectos</text:p>
      <text:p text:style-name="P1"/>
      <text:p text:style-name="P6"><text:tab/>http://localhost/<text:span text:style-name="T5">sumarService?nro1=4</text:span></text:p>
      <text:p text:style-name="Preformatted_20_Text"/>
      <text:p text:style-name="P1">Se espera <text:span text:style-name="T6">aviso de ingreso de parámetros</text:span></text:p>
      <text:p text:style-name="P9">OK</text:p>
      <text:h text:style-name="P10" text:outline-level="2"><text:soft-page-break/><text:span text:style-name="T7">4</text:span>- Testear Programa con <text:span text:style-name="T4">dos</text:span> parámetro<text:span text:style-name="T6">s</text:span> de entrada <text:span text:style-name="T1">correctos</text:span></text:h>
      <text:p text:style-name="P1"/>
      <text:p text:style-name="P1">Fundamentos: Verificar ingreso de parámetros correctos</text:p>
      <text:p text:style-name="P1"/>
      <text:p text:style-name="P6"><text:tab/>http://localhost/<text:span text:style-name="T5">sumarService?nro1=4&amp;nro2=8</text:span></text:p>
      <text:p text:style-name="P1"/>
      <text:p text:style-name="P11">Se espera la suma de los parámetros de entrada</text:p>
      <text:p text:style-name="P12">OK</text:p>
      <text:h text:style-name="P13" text:outline-level="2"><text:span text:style-name="T7">5</text:span>- Testear Programa con <text:span text:style-name="T6">tres o más</text:span> parámetro<text:span text:style-name="T6">s</text:span> de entrada</text:h>
      <text:p text:style-name="P14"/>
      <text:p text:style-name="P14">Fundamentos: Verificar ingreso de parámetros incorrectos</text:p>
      <text:p text:style-name="P14"/>
      <text:p text:style-name="P15"><text:tab/><text:span text:style-name="T8">http://localhost/</text:span><text:span text:style-name="T9">sumarService?nro1=4&amp;nro2=8&amp;nro3=5</text:span></text:p>
      <text:p text:style-name="P6"><text:span text:style-name="T10"><text:tab/></text:span><text:span text:style-name="T8">http://localhost/</text:span><text:span text:style-name="T9">sumarService?nro1=4&amp;nro2=8&amp;nro3=5&amp;nombre=Juan</text:span></text:p>
      <text:p text:style-name="P11">Se espera la suma de los dos primeros parámetros de entrada</text:p>
      <text:p text:style-name="P16">OK</text:p>
      <text:p text:style-name="P14"/>
      <text:h text:style-name="P13" text:outline-level="2"><text:span text:style-name="T7">6</text:span>- Testear Programa con parámetro<text:span text:style-name="T6">s</text:span> <text:span text:style-name="T6">de entr</text:span>ada <text:span text:style-name="T6">no numéricos</text:span></text:h>
      <text:p text:style-name="P14"/>
      <text:p text:style-name="P14">Fundamentos: Verificar ingreso de parámetros incorrectos</text:p>
      <text:p text:style-name="P14"/>
      <text:p text:style-name="P17"><text:tab/><text:span text:style-name="T11">http://localhost/</text:span><text:span text:style-name="T12">sumarService?nro1=hola&amp;nro2=chau</text:span></text:p>
      <text:p text:style-name="P17"><text:tab/><text:span text:style-name="T11">http://localhost/</text:span><text:span text:style-name="T12">sumarService?nro1=hola&amp;nro2=8</text:span></text:p>
      <text:p text:style-name="P17"><text:tab/><text:span text:style-name="T11">http://localhost/</text:span><text:span text:style-name="T12">sumarService?nro1=4&amp;nro2=chau</text:span></text:p>
      <text:p text:style-name="P18"/>
      <text:p text:style-name="P11">Se espera un aviso de error de parámetros de entrada</text:p>
      <text:p text:style-name="P19">ERROR</text:p>
      <text:h text:style-name="P13" text:outline-level="2"><text:span text:style-name="T7">7</text:span>- Testear Programa con parámetro<text:span text:style-name="T6">s</text:span> <text:span text:style-name="T6">de entr</text:span>ada <text:span text:style-name="T6">no entero</text:span></text:h>
      <text:p text:style-name="P14"/>
      <text:p text:style-name="P14">Fundamentos: Verificar ingreso de parámetros incorrectos</text:p>
      <text:p text:style-name="P14"/>
      <text:p text:style-name="P17"><text:tab/><text:a xlink:type="simple" xlink:href="http://localhost/sumarService?nro1=10&amp;nro2=10.0" text:style-name="Internet_20_link" text:visited-style-name="Visited_20_Internet_20_Link"><text:span text:style-name="T8">http://localhost/</text:span><text:span text:style-name="T9">sumarService?nro1=10&amp;nro2=10.0</text:span></text:a></text:p>
      <text:p text:style-name="P6"><text:span text:style-name="T8"><text:tab/>http://localhost/</text:span><text:span text:style-name="T9">sumarService?nro1=3.5&amp;nro2=5.5</text:span></text:p>
      <text:p text:style-name="P17"><text:tab/><text:a xlink:type="simple" xlink:href="http://localhost/sumarService?nro1=10&amp;nro2=10.0" text:style-name="Internet_20_link" text:visited-style-name="Visited_20_Internet_20_Link"><text:span text:style-name="T8">http://localhost/</text:span><text:span text:style-name="T10">sumarService?nro1=4.1&amp;nro2=</text:span></text:a><text:span text:style-name="T9">4</text:span></text:p>
      <text:p text:style-name="P17"><text:span text:style-name="T10"><text:tab/></text:span><text:a xlink:type="simple" xlink:href="http://localhost/sumarService?nro1=10&amp;nro2=10.0" text:style-name="Internet_20_link" text:visited-style-name="Visited_20_Internet_20_Link"><text:span text:style-name="T8">http://localhost/</text:span><text:span text:style-name="T10">sumarService?nro1=4.1&amp;nro2=</text:span></text:a><text:span text:style-name="T9">5.6</text:span></text:p>
      <text:p text:style-name="P18"/>
      <text:p text:style-name="P11">Se espera la suma de los dos primeros números</text:p>
      <text:p text:style-name="P20">OK</text:p>
      <text:h text:style-name="P13" text:outline-level="2"><text:span text:style-name="T7">8</text:span>- Testear Programa con parámetro<text:span text:style-name="T6">s</text:span> <text:span text:style-name="T6">de entr</text:span>ada <text:span text:style-name="T6">neutros</text:span></text:h>
      <text:p text:style-name="P14"/>
      <text:p text:style-name="P14">Fundamentos: Verificar ingreso de parámetros <text:span text:style-name="T13">neutro</text:span></text:p>
      <text:p text:style-name="P14"/>
      <text:p text:style-name="P21"><text:tab/><text:span text:style-name="T6">http://localhost/</text:span><text:span text:style-name="T5">sumarService?nro1=10&amp;nro2=0</text:span></text:p>
      <text:p text:style-name="P17"><text:span text:style-name="T8"><text:tab/>http://localhost/</text:span><text:span text:style-name="T9">sumarService?nro1=0&amp;nro2=10</text:span></text:p>
      <text:p text:style-name="P17"><text:span text:style-name="T8"><text:tab/>http://localhost/</text:span><text:span text:style-name="T9">sumarService?nro1=0&amp;nro2=0</text:span></text:p>
      <text:p text:style-name="P17"><text:span text:style-name="T8"><text:tab/>http://localhost/</text:span><text:span text:style-name="T9">sumarService?nro1=10&amp;nro2=0&amp;nro3=0</text:span></text:p>
      <text:p text:style-name="P22"><text:tab/></text:p>
      <text:p text:style-name="P23"><text:tab/></text:p>
      <text:p text:style-name="P11">Se espera la suma de los dos primeros números</text:p>
      <text:p text:style-name="P20"><text:soft-page-break/>OK</text:p>
      <text:h text:style-name="P13" text:outline-level="2"><text:span text:style-name="T7">9</text:span>- Testear Programa con parámetro<text:span text:style-name="T6">s</text:span> <text:span text:style-name="T6">de entr</text:span>ada <text:span text:style-name="T6">negativos</text:span></text:h>
      <text:p text:style-name="P14"/>
      <text:p text:style-name="P14">Fundamentos: Verificar ingreso de parámetros incorrectos</text:p>
      <text:p text:style-name="P14"/>
      <text:p text:style-name="P24"><text:span text:style-name="T8"><text:tab/>http://localhost/</text:span><text:span text:style-name="T9">sumarService?nro1=-10&amp;nro2=-</text:span><text:span text:style-name="T14">1</text:span><text:span text:style-name="T9">0</text:span></text:p>
      <text:p text:style-name="P24"><text:span text:style-name="T8"><text:tab/>http://localhost/</text:span><text:span text:style-name="T9">sumarService?nro1=-</text:span><text:span text:style-name="T14">5</text:span><text:span text:style-name="T9">&amp;nro2=</text:span><text:span text:style-name="T14">1</text:span><text:span text:style-name="T9">0</text:span></text:p>
      <text:p text:style-name="P24"><text:span text:style-name="T8"><text:tab/>http://localhost/</text:span><text:span text:style-name="T9">sumarService?nro1=10&amp;nro2=-</text:span><text:span text:style-name="T14">5</text:span><text:span text:style-name="T9">0</text:span></text:p>
      <text:p text:style-name="P24"><text:span text:style-name="T8"><text:tab/>http://localhost/</text:span><text:span text:style-name="T9">sumarService?nro1=-</text:span><text:span text:style-name="T14">5</text:span><text:span text:style-name="T9">&amp;nro2=-</text:span><text:span text:style-name="T14">5</text:span><text:span text:style-name="T9">&amp;nro3=-</text:span><text:span text:style-name="T14">5</text:span></text:p>
      <text:p text:style-name="P24"><text:span text:style-name="T8"><text:tab/>http://localhost/</text:span><text:span text:style-name="T9">sumarService?nro1=-10&amp;nro2=0&amp;nro3=0</text:span></text:p>
      <text:p text:style-name="P24"><text:span text:style-name="T8"><text:tab/>http://localhost/</text:span><text:span text:style-name="T9">sumarService?nro1=-10&amp;nro2=-0</text:span></text:p>
      <text:p text:style-name="P22"><text:tab/></text:p>
      <text:p text:style-name="P18"/>
      <text:p text:style-name="P11">Se espera la suma de los dos primeros números</text:p>
      <text:p text:style-name="P20">OK</text:p>
      <text:p text:style-name="P20"/>
      <text:h text:style-name="P13" text:outline-level="2"><text:span text:style-name="T7">10</text:span>- Testear Programa <text:span text:style-name="T6">con desbordamiento en números enteros</text:span></text:h>
      <text:p text:style-name="P14"/>
      <text:p text:style-name="P14">Fundamentos: Verificar ingreso de parámetros incorrectos</text:p>
      <text:p text:style-name="P14"/>
      <text:p text:style-name="P24"><text:span text:style-name="T8"><text:tab/>http://localhost/</text:span><text:span text:style-name="T9">sumarService?nro1=</text:span><text:span text:style-name="T8">2000000000</text:span><text:span text:style-name="T9">&amp;nro2= </text:span><text:span text:style-name="T8">2000000000</text:span></text:p>
      <text:p text:style-name="P24"><text:span text:style-name="T9"><text:tab/></text:span><text:span text:style-name="T8">http://localhost/</text:span><text:span text:style-name="T9">sumarService?nro1=-</text:span><text:span text:style-name="T8">2000000000</text:span><text:span text:style-name="T9">&amp;nro2=-</text:span><text:span text:style-name="T8">2000000000</text:span></text:p>
      <text:p text:style-name="P22"><text:tab/></text:p>
      <text:p text:style-name="P18"/>
      <text:p text:style-name="P11">Se espera la suma de los dos primeros números o aviso de parámetros incorrectos</text:p>
      <text:p text:style-name="P25">OK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09-26T12:18:42.111000000</meta:creation-date>
    <meta:generator>LibreOffice/26.2.1.2$Windows_X86_64 LibreOffice_project/620$Build-2</meta:generator>
    <dc:date>2026-05-28T10:48:00.361930200</dc:date>
    <meta:editing-duration>PT2H8M30S</meta:editing-duration>
    <meta:editing-cycles>15</meta:editing-cycles>
    <meta:document-statistic meta:table-count="0" meta:image-count="0" meta:object-count="0" meta:page-count="3" meta:paragraph-count="80" meta:word-count="344" meta:character-count="3257" meta:non-whitespace-character-count="2960"/>
  </office:meta>
</office:document-meta>
</file>